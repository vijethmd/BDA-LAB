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2000003B932149B0353313EA8.png" manifest:media-type="image/png"/>
  <manifest:file-entry manifest:full-path="Pictures/10000001000003740000039568391EB747A958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053cm" svg:y="0.383cm" svg:width="17cm" svg:height="17.634cm" draw:z-index="0"><draw:image xlink:href="Pictures/10000001000003740000039568391EB747A9584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" text:anchor-type="char" svg:width="17cm" svg:height="18.367cm" draw:z-index="1"><draw:image xlink:href="Pictures/1000000100000372000003B932149B0353313E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4T15:32:03.940422834</meta:creation-date>
    <dc:date>2026-04-24T15:36:43.344667471</dc:date>
    <meta:editing-duration>PT4M41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